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X values</text:p>
          </table:table-cell>
          <table:table-cell office:value-type="string" calcext:value-type="string">
            <text:p>Y values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ovo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gaByt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1T14:31:00.625523470</meta:creation-date>
    <dc:date>2023-12-21T14:34:05.885014341</dc:date>
    <meta:editing-duration>PT3M5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